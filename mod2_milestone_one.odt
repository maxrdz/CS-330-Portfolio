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18EE67577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center" style:justify-single-word="false"/>
      <style:text-properties fo:font-weight="bold" officeooo:rsid="006188f4" officeooo:paragraph-rsid="006188f4" style:font-weight-asian="bold" style:font-weight-complex="bold"/>
    </style:style>
    <style:style style:name="P3" style:family="paragraph" style:parent-style-name="Standard">
      <style:paragraph-properties fo:line-height="200%" fo:text-align="center" style:justify-single-word="false"/>
      <style:text-properties officeooo:rsid="000b3911" officeooo:paragraph-rsid="000b3911"/>
    </style:style>
    <style:style style:name="P4" style:family="paragraph" style:parent-style-name="Standard">
      <style:paragraph-properties fo:line-height="200%" fo:text-align="center" style:justify-single-word="false"/>
      <style:text-properties officeooo:rsid="0011fcdd" officeooo:paragraph-rsid="0011fcdd"/>
    </style:style>
    <style:style style:name="P5" style:family="paragraph" style:parent-style-name="Standard">
      <style:paragraph-properties fo:line-height="200%" fo:text-align="center" style:justify-single-word="false"/>
      <style:text-properties officeooo:rsid="009d2ef9" officeooo:paragraph-rsid="009d2ef9"/>
    </style:style>
    <style:style style:name="P6" style:family="paragraph" style:parent-style-name="Standard">
      <style:paragraph-properties fo:line-height="200%" fo:text-align="center" style:justify-single-word="false"/>
      <style:text-properties officeooo:rsid="008c97fe" officeooo:paragraph-rsid="008c97fe"/>
    </style:style>
    <style:style style:name="P7" style:family="paragraph" style:parent-style-name="Standard">
      <style:paragraph-properties fo:line-height="200%" fo:text-align="center" style:justify-single-word="false"/>
      <style:text-properties fo:font-size="12pt" officeooo:rsid="00b1065a" officeooo:paragraph-rsid="00b1065a" style:font-size-asian="12pt" style:font-size-complex="12pt"/>
    </style:style>
    <style:style style:name="P8" style:family="paragraph" style:parent-style-name="Standard">
      <style:paragraph-properties fo:line-height="200%" fo:text-align="left" style:justify-single-word="false" fo:break-before="page"/>
      <style:text-properties officeooo:rsid="004ee049" officeooo:paragraph-rsid="00aa21ab"/>
    </style:style>
    <style:style style:name="P9" style:family="paragraph" style:parent-style-name="Standard">
      <style:paragraph-properties fo:line-height="200%" fo:text-align="left" style:justify-single-word="false"/>
      <style:text-properties officeooo:rsid="004ee049" officeooo:paragraph-rsid="00aa21ab"/>
    </style:style>
    <style:style style:name="P10" style:family="paragraph" style:parent-style-name="Standard">
      <style:paragraph-properties fo:line-height="200%" fo:text-align="left" style:justify-single-word="false"/>
      <style:text-properties officeooo:rsid="004ee049" officeooo:paragraph-rsid="0017ddb3"/>
    </style:style>
    <style:style style:name="T1" style:family="text">
      <style:text-properties officeooo:rsid="00a5304d"/>
    </style:style>
    <style:style style:name="T2" style:family="text">
      <style:text-properties officeooo:rsid="009c4329"/>
    </style:style>
    <style:style style:name="T3" style:family="text">
      <style:text-properties officeooo:rsid="009d0cf5"/>
    </style:style>
    <style:style style:name="T4" style:family="text">
      <style:text-properties officeooo:rsid="00b1065a"/>
    </style:style>
    <style:style style:name="T5" style:family="text">
      <style:text-properties style:text-position="super 58%" officeooo:rsid="00b1065a"/>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abd0ed"/>
    </style:style>
    <style:style style:name="T10" style:family="text">
      <style:text-properties fo:font-size="14pt" style:font-size-asian="14pt" style:font-size-complex="14pt"/>
    </style:style>
    <style:style style:name="T11" style:family="text">
      <style:text-properties officeooo:rsid="00a8b2bc"/>
    </style:style>
    <style:style style:name="T12" style:family="text">
      <style:text-properties officeooo:rsid="00aef6dd"/>
    </style:style>
    <style:style style:name="T13" style:family="text">
      <style:text-properties officeooo:rsid="00ae11bd"/>
    </style:style>
    <style:style style:name="T14" style:family="text">
      <style:text-properties officeooo:rsid="00b04a8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Module <text:span text:style-name="T1">Two – Milestone One – Project Proposal</text:span></text:p>
      <text:p text:style-name="P3"/>
      <text:p text:style-name="P3">Max Rodriguez</text:p>
      <text:p text:style-name="P3">Southern New Hampshire University</text:p>
      <text:p text:style-name="P4">CS 3<text:span text:style-name="T2">30 – Comp. Graphic </text:span><text:span text:style-name="T3">and Visualization</text:span></text:p>
      <text:p text:style-name="P5">Brian Battersby</text:p>
      <text:p text:style-name="P6">May <text:span text:style-name="T4">17</text:span><text:span text:style-name="T5">th</text:span><text:span text:style-name="T4">, 2026</text:span></text:p>
      <text:p text:style-name="P6"/>
      <text:p text:style-name="P7">Revised on May 30<text:span text:style-name="T6">th</text:span>, 2026</text:p>
      <text:p text:style-name="P8"><text:tab/></text:p>
      <text:p text:style-name="P9"><draw:frame draw:style-name="fr1" draw:name="Image1" text:anchor-type="char" svg:width="3.1252in" svg:height="2.0728in" draw:z-index="0"><draw:image xlink:href="Pictures/10000000000002580000018EE675771D.jpg" xlink:type="simple" xlink:show="embed" xlink:actuate="onLoad" draw:mime-type="image/jpeg"/></draw:frame></text:p>
      <text:p text:style-name="P9"><text:tab/>I selected the <text:span text:style-name="T7">topiary garden</text:span> image as the 2D scene for my 3D project. The scene contains several different objects and shapes that can be recreated in OpenGL. I chose this image because it includes repeating objects, simple geometry, and one complex object that can be built from multiple shapes. The scene will contain at least four objects, including the conical bushes, rectangular hedges, circular hedge, and spiral topiary. The ground and pathway will also be included to complete the environment.</text:p>
      <text:p text:style-name="P10"/>
      <text:p text:style-name="P10"><text:tab/>The <text:span text:style-name="T8">conical bushes</text:span><text:span text:style-name="T7"> </text:span>will be created using <text:span text:style-name="T9">tapered cylinders for the main body, and a cone for the head of the bushes.</text:span>. The <text:span text:style-name="T8">rectangular hedges</text:span><text:span text:style-name="T10"> </text:span>will use boxes, <text:span text:style-name="T9">but with a scale applied to their geometry to lengthen as needed</text:span>. The <text:span text:style-name="T8">gravel pathway/</text:span><text:span text:style-name="T8">ground</text:span> will be represented with planes. The <text:span text:style-name="T8">circular hedge</text:span> in the center can be created using a torus combined with a cylinder. The spiral topiary is the most detailed object and will require multiple cones and cylinders stacked together to create the spiral shape. Background trees may use cones and spheres to simplify the design.</text:p>
      <text:p text:style-name="P10"/>
      <text:p text:style-name="P10"><text:soft-page-break/><text:tab/>These objects are a good choice because they use several different 3D shapes while remaining manageable to create. The scene is visually interesting but still achievable within the project scope. I’<text:span text:style-name="T11">m going to</text:span> use textures and camera movement to make the final 3D environment look <text:span text:style-name="T12">as</text:span><text:span text:style-name="T13"> </text:span><text:span text:style-name="T14">good</text:span><text:span text:style-name="T13"> </text:span><text:span text:style-name="T12">as </text:span><text:span text:style-name="T13">possi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6T12:34:16.189588272</meta:creation-date>
    <dc:date>2026-05-30T19:01:32.685597716</dc:date>
    <meta:editing-duration>PT1H38M47S</meta:editing-duration>
    <meta:editing-cycles>149</meta:editing-cycles>
    <meta:generator>LibreOffice/26.2.3.2$Linux_X86_64 LibreOffice_project/620$Build-2</meta:generator>
    <meta:document-statistic meta:table-count="0" meta:image-count="1" meta:object-count="0" meta:page-count="3" meta:paragraph-count="11" meta:word-count="255" meta:character-count="1566" meta:non-whitespace-character-count="1314"/>
  </office:meta>
</office:document-meta>
</file>